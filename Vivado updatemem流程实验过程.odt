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E0000009D461490DB.png" manifest:media-type="image/png"/>
  <manifest:file-entry manifest:full-path="Pictures/100000000000053200000069F733478F.png" manifest:media-type="image/png"/>
  <manifest:file-entry manifest:full-path="Pictures/10000000000003880000009067B01EB2.png" manifest:media-type="image/png"/>
  <manifest:file-entry manifest:full-path="Pictures/1000000000000090000000F0946CAD5B.png" manifest:media-type="image/png"/>
  <manifest:file-entry manifest:full-path="Pictures/1000000000000094000000A96A62F9A2.png" manifest:media-type="image/png"/>
  <manifest:file-entry manifest:full-path="Pictures/100000000000041D000002171A0FEA43.png" manifest:media-type="image/png"/>
  <manifest:file-entry manifest:full-path="Pictures/10000000000002E7000002B21B1EFAC5.png" manifest:media-type="image/png"/>
  <manifest:file-entry manifest:full-path="Pictures/10000000000003A100000046815AFF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995cm" table:align="left"/>
    </style:style>
    <style:style style:name="表格1.A" style:family="table-column">
      <style:table-column-properties style:column-width="2.833cm"/>
    </style:style>
    <style:style style:name="表格1.C" style:family="table-column">
      <style:table-column-properties style:column-width="2.835cm"/>
    </style:style>
    <style:style style:name="表格1.F" style:family="table-column">
      <style:table-column-properties style:column-width="2.829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F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F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8.996cm" table:align="left"/>
    </style:style>
    <style:style style:name="表格2.A" style:family="table-column">
      <style:table-column-properties style:column-width="1.893cm"/>
    </style:style>
    <style:style style:name="表格2.B" style:family="table-column">
      <style:table-column-properties style:column-width="2.402cm"/>
    </style:style>
    <style:style style:name="表格2.C" style:family="table-column">
      <style:table-column-properties style:column-width="2.706cm"/>
    </style:style>
    <style:style style:name="表格2.D" style:family="table-column">
      <style:table-column-properties style:column-width="1.995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8.996cm" table:align="left"/>
    </style:style>
    <style:style style:name="表格3.A" style:family="table-column">
      <style:table-column-properties style:column-width="1.893cm"/>
    </style:style>
    <style:style style:name="表格3.B" style:family="table-column">
      <style:table-column-properties style:column-width="2.605cm"/>
    </style:style>
    <style:style style:name="表格3.C" style:family="table-column">
      <style:table-column-properties style:column-width="2.402cm"/>
    </style:style>
    <style:style style:name="表格3.D" style:family="table-column">
      <style:table-column-properties style:column-width="2.096cm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D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69945" officeooo:paragraph-rsid="0006994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790a8" officeooo:paragraph-rsid="001790a8" style:font-size-asian="14pt" style:font-size-complex="14pt"/>
    </style:style>
    <style:style style:name="P3" style:family="paragraph" style:parent-style-name="Standard">
      <style:text-properties officeooo:rsid="00069945" officeooo:paragraph-rsid="00069945"/>
    </style:style>
    <style:style style:name="P4" style:family="paragraph" style:parent-style-name="Standard">
      <style:text-properties officeooo:rsid="00069945" officeooo:paragraph-rsid="0009f91b"/>
    </style:style>
    <style:style style:name="P5" style:family="paragraph" style:parent-style-name="Standard" style:list-style-name="L1">
      <style:text-properties officeooo:paragraph-rsid="0009f91b"/>
    </style:style>
    <style:style style:name="P6" style:family="paragraph" style:parent-style-name="Table_20_Contents">
      <style:text-properties officeooo:rsid="000cc13b" officeooo:paragraph-rsid="000cc13b"/>
    </style:style>
    <style:style style:name="P7" style:family="paragraph" style:parent-style-name="Table_20_Contents">
      <style:text-properties officeooo:rsid="000e9011" officeooo:paragraph-rsid="000e9011"/>
    </style:style>
    <style:style style:name="P8" style:family="paragraph" style:parent-style-name="Table_20_Contents">
      <style:text-properties officeooo:rsid="000d2559" officeooo:paragraph-rsid="000d2559"/>
    </style:style>
    <style:style style:name="P9" style:family="paragraph" style:parent-style-name="Text_20_body">
      <style:text-properties fo:color="#ff0000" loext:opacity="100%" fo:font-weight="bold" style:font-weight-asian="bold" style:font-weight-complex="bold"/>
    </style:style>
    <style:style style:name="P10" style:family="paragraph" style:parent-style-name="Text_20_body">
      <style:text-properties officeooo:rsid="000c59a8" officeooo:paragraph-rsid="000c59a8"/>
    </style:style>
    <style:style style:name="P11" style:family="paragraph" style:parent-style-name="Text_20_body">
      <style:text-properties officeooo:rsid="000fa919" officeooo:paragraph-rsid="000fa919"/>
    </style:style>
    <style:style style:name="P12" style:family="paragraph" style:parent-style-name="Table_20_Contents">
      <style:text-properties officeooo:rsid="00141d2b" officeooo:paragraph-rsid="00141d2b"/>
    </style:style>
    <style:style style:name="P13" style:family="paragraph" style:parent-style-name="Table_20_Contents">
      <style:text-properties officeooo:paragraph-rsid="00141d2b"/>
    </style:style>
    <style:style style:name="P14" style:family="paragraph" style:parent-style-name="Standard">
      <style:text-properties officeooo:rsid="000fa919" officeooo:paragraph-rsid="00141d2b"/>
    </style:style>
    <style:style style:name="P15" style:family="paragraph" style:parent-style-name="Standard">
      <style:text-properties fo:font-weight="bold" officeooo:rsid="000fa919" officeooo:paragraph-rsid="00141d2b" style:font-weight-asian="bold" style:font-weight-complex="bold"/>
    </style:style>
    <style:style style:name="P16" style:family="paragraph" style:parent-style-name="Standard">
      <style:text-properties officeooo:rsid="0015e45a" officeooo:paragraph-rsid="0015e45a"/>
    </style:style>
    <style:style style:name="P17" style:family="paragraph" style:parent-style-name="Standard">
      <style:text-properties officeooo:rsid="0015e45a" officeooo:paragraph-rsid="00165a74"/>
    </style:style>
    <style:style style:name="P18" style:family="paragraph" style:parent-style-name="Standard">
      <style:text-properties officeooo:rsid="0015e45a" officeooo:paragraph-rsid="00177dad"/>
    </style:style>
    <style:style style:name="T1" style:family="text">
      <style:text-properties officeooo:rsid="00080c04"/>
    </style:style>
    <style:style style:name="T2" style:family="text">
      <style:text-properties officeooo:rsid="0009f91b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0b6450"/>
    </style:style>
    <style:style style:name="T5" style:family="text">
      <style:text-properties officeooo:rsid="000b6450"/>
    </style:style>
    <style:style style:name="T6" style:family="text">
      <style:text-properties officeooo:rsid="000cc13b"/>
    </style:style>
    <style:style style:name="T7" style:family="text">
      <style:text-properties officeooo:rsid="00130420"/>
    </style:style>
    <style:style style:name="T8" style:family="text">
      <style:text-properties officeooo:rsid="000c59a8"/>
    </style:style>
    <style:style style:name="T9" style:family="text">
      <style:text-properties officeooo:rsid="00113e39"/>
    </style:style>
    <style:style style:name="T10" style:family="text">
      <style:text-properties officeooo:rsid="001240d1"/>
    </style:style>
    <style:style style:name="T11" style:family="text">
      <style:text-properties officeooo:rsid="00141d2b"/>
    </style:style>
    <style:style style:name="T12" style:family="text">
      <style:text-properties officeooo:rsid="00143572"/>
    </style:style>
    <style:style style:name="T13" style:family="text">
      <style:text-properties officeooo:rsid="00150415"/>
    </style:style>
    <style:style style:name="T14" style:family="text">
      <style:text-properties officeooo:rsid="00177d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vado updatemem流程的实验过程</text:p>
      <text:p text:style-name="P2">2026-01-02</text:p>
      <text:p text:style-name="P3"/>
      <text:p text:style-name="P3">使用的双口RAM存代码，它的配置为<text:span text:style-name="T1">16x8k。布局布线后如下：</text:span></text:p>
      <text:p text:style-name="P3"/>
      <text:p text:style-name="P4"><draw:frame draw:style-name="fr1" draw:name="图像1" text:anchor-type="char" svg:width="16.984cm" svg:height="1.575cm" draw:z-index="0"><draw:image xlink:href="Pictures/100000000000053200000069F733478F.png" xlink:type="simple" xlink:show="embed" xlink:actuate="onLoad" draw:mime-type="image/png"/></draw:frame><text:s/></text:p>
      <text:p text:style-name="P4">从上到下分别命名为<text:span text:style-name="T1">ramloop0,ramloop1,ramloop2和ramloop3。</text:span></text:p>
      <text:p text:style-name="P4">怕截图看不清，再复制一下名字如下：</text:p>
      <text:list text:style-name="L1">
        <text:list-item>
          <text:p text:style-name="P5"><text:span text:style-name="T2">ram_16x8k_dp_pmem_shared/U0/inst_blk_mem_gen/gnbram.gnativebmg.native_blk_mem_gen/valid.cstr/ramloop[0].ram.r/prim_init.ram/ DEVICE_7SERIES.NO_BMM_INFO.TRUE_DP.SIMPLE_PRIM36.ram，物理位置X4Y26</text:span></text:p>
        </text:list-item>
        <text:list-item>
          <text:p text:style-name="P5">ram_16x8k_dp_pmem_shared/U0/inst_blk_mem_gen/gnbram.gnativebmg.native_blk_mem_gen/valid.cstr/ramloop[1].ram.r/prim_init.ram/DEVICE_7SERIES.NO_BMM_INFO.TRUE_DP.SIMPLE_PRIM36.ram，物理位置X4Y<text:span text:style-name="T2">25</text:span></text:p>
        </text:list-item>
        <text:list-item>
          <text:p text:style-name="P5">ram_16x8k_dp_pmem_shared/U0/inst_blk_mem_gen/gnbram.gnativebmg.native_blk_mem_gen/valid.cstr/ramloop[2].ram.r/prim_init.ram/DEVICE_7SERIES.NO_BMM_INFO.TRUE_DP.SIMPLE_PRIM36.ram，物理位置X<text:span text:style-name="T2">3Y24</text:span></text:p>
        </text:list-item>
        <text:list-item>
          <text:p text:style-name="P5">ram_16x8k_dp_pmem_shared/U0/inst_blk_mem_gen/gnbram.gnativebmg.native_blk_mem_gen/valid.cstr/ramloop[3].ram.r/prim_init.ram/DEVICE_7SERIES.NO_BMM_INFO.TRUE_DP.SIMPLE_PRIM36.ram，物理位置X<text:span text:style-name="T2">3Y25</text:span></text:p>
          <text:p text:style-name="P5"/>
        </text:list-item>
      </text:list>
      <text:p text:style-name="Text_20_body">由于数据一直不对，所以代码里面增加了测试模式和chipscope，去除写功能（<text:span text:style-name="T3">不知道为什么msp</text:span><text:span text:style-name="T4">430会对pmem进行写操作，这是另外一个要解决的问题</text:span>），同时自己造地址读出整个pmem,用<text:span text:style-name="T5">chipscope看输出数据。为了便于检查，</text:span>数据文件的开头，中间（<text:span text:style-name="T5">4095字节附近</text:span>）和结尾的数据分别如下：</text:p>
      <text:p text:style-name="Text_20_body"><draw:frame draw:style-name="fr2" draw:name="图像2" text:anchor-type="char" svg:x="0.584cm" svg:y="0.122cm" svg:width="3.334cm" svg:height="4.154cm" draw:z-index="1"><draw:image xlink:href="Pictures/100000000000007E0000009D461490DB.png" xlink:type="simple" xlink:show="embed" xlink:actuate="onLoad" draw:mime-type="image/png"/></draw:frame><draw:frame draw:style-name="fr2" draw:name="图像3" text:anchor-type="char" svg:x="5.156cm" svg:y="0.155cm" svg:width="4.059cm" svg:height="5.532cm" draw:z-index="2"><draw:image xlink:href="Pictures/1000000000000090000000F0946CAD5B.png" xlink:type="simple" xlink:show="embed" xlink:actuate="onLoad" draw:mime-type="image/png"/></draw:frame><draw:frame draw:style-name="fr2" draw:name="图像4" text:anchor-type="char" svg:x="10.978cm" svg:y="0.318cm" svg:width="3.916cm" svg:height="4.471cm" draw:z-index="3"><draw:image xlink:href="Pictures/1000000000000094000000A96A62F9A2.png" xlink:type="simple" xlink:show="embed" xlink:actuate="onLoad" draw:mime-type="image/png"/></draw:frame></text:p>
      <text:p text:style-name="Text_20_body"/>
      <text:p text:style-name="Text_20_body"/>
      <text:p text:style-name="Text_20_body"><text:tab/><text:tab/><text:tab/><text:tab/><text:tab/><text:tab/><text:tab/><text:tab/><text:tab/><text:tab/><text:tab/><text:tab/><text:tab/><text:tab/></text:p>
      <text:p text:style-name="Text_20_body"/>
      <table:table table:name="表格1" table:style-name="表格1">
        <table:table-column table:style-name="表格1.A" table:number-columns-repeated="2"/>
        <table:table-column table:style-name="表格1.C"/>
        <table:table-column table:style-name="表格1.A" table:number-columns-repeated="2"/>
        <table:table-column table:style-name="表格1.F"/>
        <table:table-row>
          <table:table-cell table:style-name="表格1.A1" office:value-type="string">
            <text:p text:style-name="Table_20_Contents"><text:span text:style-name="T6">Mem</text:span>地址</text:p>
          </table:table-cell>
          <table:table-cell table:style-name="表格1.A1" office:value-type="string">
            <text:p text:style-name="Table_20_Contents">数据</text:p>
          </table:table-cell>
          <table:table-cell table:style-name="表格1.A1" office:value-type="string">
            <text:p text:style-name="Table_20_Contents"><text:span text:style-name="T6">Mem</text:span>地址</text:p>
          </table:table-cell>
          <table:table-cell table:style-name="表格1.A1" office:value-type="string">
            <text:p text:style-name="Table_20_Contents">数据</text:p>
          </table:table-cell>
          <table:table-cell table:style-name="表格1.A1" office:value-type="string">
            <text:p text:style-name="Table_20_Contents"><text:span text:style-name="T6">Mem</text:span>地址</text:p>
          </table:table-cell>
          <table:table-cell table:style-name="表格1.F1" office:value-type="string">
            <text:p text:style-name="Table_20_Contents">数据</text:p>
          </table:table-cell>
        </table:table-row>
        <table:table-row>
          <table:table-cell table:style-name="表格1.A2" office:value-type="string">
            <text:p text:style-name="P6">0x0000</text:p>
          </table:table-cell>
          <table:table-cell table:style-name="表格1.A2" office:value-type="string">
            <text:p text:style-name="P6">0x1234</text:p>
          </table:table-cell>
          <table:table-cell table:style-name="表格1.A2" office:value-type="string">
            <text:p text:style-name="P6">0x0ffb(4091)</text:p>
          </table:table-cell>
          <table:table-cell table:style-name="表格1.A2" office:value-type="string">
            <text:p text:style-name="P6">0x1122</text:p>
          </table:table-cell>
          <table:table-cell table:style-name="表格1.A2" office:value-type="string">
            <text:p text:style-name="P7">0x1ffd(8189)</text:p>
          </table:table-cell>
          <table:table-cell table:style-name="表格1.F2" office:value-type="string">
            <text:p text:style-name="P7">0xabcd</text:p>
          </table:table-cell>
        </table:table-row>
        <table:table-row>
          <table:table-cell table:style-name="表格1.A2" office:value-type="string">
            <text:p text:style-name="P6">0x0001</text:p>
          </table:table-cell>
          <table:table-cell table:style-name="表格1.A2" office:value-type="string">
            <text:p text:style-name="P6">0x5678</text:p>
          </table:table-cell>
          <table:table-cell table:style-name="表格1.A2" office:value-type="string">
            <text:p text:style-name="P6">0x0ffc(4092)</text:p>
          </table:table-cell>
          <table:table-cell table:style-name="表格1.A2" office:value-type="string">
            <text:p text:style-name="P6">0x3344</text:p>
          </table:table-cell>
          <table:table-cell table:style-name="表格1.A2" office:value-type="string">
            <text:p text:style-name="P7">0x1ffe(8190)</text:p>
          </table:table-cell>
          <table:table-cell table:style-name="表格1.F2" office:value-type="string">
            <text:p text:style-name="P7">0x1234</text:p>
          </table:table-cell>
        </table:table-row>
        <table:table-row>
          <table:table-cell table:style-name="表格1.A2" office:value-type="string">
            <text:p text:style-name="P6">0x0002</text:p>
          </table:table-cell>
          <table:table-cell table:style-name="表格1.A2" office:value-type="string">
            <text:p text:style-name="P6">0x4031</text:p>
          </table:table-cell>
          <table:table-cell table:style-name="表格1.A2" office:value-type="string">
            <text:p text:style-name="P6">0x0ffd(4093)</text:p>
          </table:table-cell>
          <table:table-cell table:style-name="表格1.A2" office:value-type="string">
            <text:p text:style-name="P6">0x5566</text:p>
          </table:table-cell>
          <table:table-cell table:style-name="表格1.A2" office:value-type="string">
            <text:p text:style-name="P7">0x1fff(8191)</text:p>
          </table:table-cell>
          <table:table-cell table:style-name="表格1.F2" office:value-type="string">
            <text:p text:style-name="P7">0xc004</text:p>
          </table:table-cell>
        </table:table-row>
        <table:table-row>
          <table:table-cell table:style-name="表格1.A2" office:value-type="string">
            <text:p text:style-name="P6">0x0004</text:p>
          </table:table-cell>
          <table:table-cell table:style-name="表格1.A2" office:value-type="string">
            <text:p text:style-name="P6">0x0a00</text:p>
          </table:table-cell>
          <table:table-cell table:style-name="表格1.A2" office:value-type="string">
            <text:p text:style-name="P8">0x0ffe(4094)</text:p>
          </table:table-cell>
          <table:table-cell table:style-name="表格1.A2" office:value-type="string">
            <text:p text:style-name="P7">0x7788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7">0x0fff(4095)</text:p>
          </table:table-cell>
          <table:table-cell table:style-name="表格1.A2" office:value-type="string">
            <text:p text:style-name="P7">0x99aa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7">0x<text:span text:style-name="T7">1000</text:span>(4096)</text:p>
          </table:table-cell>
          <table:table-cell table:style-name="表格1.A2" office:value-type="string">
            <text:p text:style-name="P7">0xbbcc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ext:soft-page-break/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7">0x100<text:span text:style-name="T7">1</text:span>(4097)</text:p>
          </table:table-cell>
          <table:table-cell table:style-name="表格1.A2" office:value-type="string">
            <text:p text:style-name="P7">0xddee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</table:table>
      <text:p text:style-name="Text_20_body"/>
      <text:p text:style-name="Text_20_body">第一版的mmi文件如下（各种试验下来的结果）：</text:p>
      <text:p text:style-name="P9">需要注意的是在<text:span text:style-name="T8">AddressSpace这里面，后面的Begin和End都是以字节为单位。否则updatemen会一直报错说数据超过了地址范围。</text:span></text:p>
      <text:p text:style-name="Text_20_body"/>
      <text:p text:style-name="P10"><draw:frame draw:style-name="fr3" draw:name="图像5" text:anchor-type="char" svg:width="17cm" svg:height="8.636cm" draw:z-index="4"><draw:image xlink:href="Pictures/100000000000041D000002171A0FEA43.png" xlink:type="simple" xlink:show="embed" xlink:actuate="onLoad" draw:mime-type="image/png"/></draw:frame>chipscope抓到的波形如下：</text:p>
      <text:p text:style-name="P10"><draw:frame draw:style-name="fr4" draw:name="图像6" text:anchor-type="char" svg:width="17cm" svg:height="2.708cm" draw:z-index="5"><draw:image xlink:href="Pictures/10000000000003880000009067B01EB2.png" xlink:type="simple" xlink:show="embed" xlink:actuate="onLoad" draw:mime-type="image/png"/></draw:frame>上面三个信号从上到下分别为读使能，地址，数据。</text:p>
      <text:p text:style-name="P11">再对着前面的输入数据表格看，会发现最后地址0x1fff(8191)这一笔数据，预期的结果应该是0xc004，但是结果是0xc0aa,低8位的0xaa来自0x0fff(4095)，也就是前一个busblock的低8位的最后一笔数据。0x1ffe(8190)的数据0x1288，低8位的0x88来自0x0ffe(4094)，也是来自前一个busblock的低8位。再看开头地址<text:span text:style-name="T9">0x0000的数据，预期结果应该是0x1234，但是变成了cc12，显示高低字节反了，其次是0xcc来自后面的busblock，地址为0x1000(4096)的数据。</text:span></text:p>
      <text:p text:style-name="P11">根据上面的线索，先把第一个<text:span text:style-name="T10">busblock的bitlane高低字节调换，再把两个buslock的低8位互换位置。</text:span></text:p>
      <text:p text:style-name="P11"/>
      <text:p text:style-name="P11"/>
      <text:p text:style-name="P11"/>
      <text:p text:style-name="P11"/>
      <text:p text:style-name="P11"><text:soft-page-break/>原来的状态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Contents">地址<text:span text:style-name="T11">0，bit15</text:span></text:p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D1" office:value-type="string">
            <text:p text:style-name="P12">地址0，bit0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12">X4Y25（<text:span text:style-name="T12">1</text:span>）</text:p>
          </table:table-cell>
          <table:table-cell table:style-name="表格2.A2" office:value-type="string">
            <text:p text:style-name="Table_20_Contents">X<text:span text:style-name="T11">4Y26（</text:span><text:span text:style-name="T12">0</text:span><text:span text:style-name="T11">）</text:span></text:p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12">X3Y24（<text:span text:style-name="T12">2</text:span>）</text:p>
          </table:table-cell>
          <table:table-cell table:style-name="表格2.A2" office:value-type="string">
            <text:p text:style-name="P12">X3Y25（<text:span text:style-name="T12">3</text:span>）</text:p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Text_20_body">很意外，按上面的思路互换完还是没有完全对，但是错误结果没记录。因为在开始、结束和BusBlock分界处放了几笔特征明显的数据，看着波形调整，很快就得到最终正确的结果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3">地址<text:span text:style-name="T11">0，bit15</text:span></text:p>
          </table:table-cell>
          <table:table-cell table:style-name="表格3.A1" office:value-type="string">
            <text:p text:style-name="P13"/>
          </table:table-cell>
          <table:table-cell table:style-name="表格3.A1" office:value-type="string">
            <text:p text:style-name="P13"/>
          </table:table-cell>
          <table:table-cell table:style-name="表格3.D1" office:value-type="string">
            <text:p text:style-name="P12">地址0，bit0</text:p>
          </table:table-cell>
        </table:table-row>
        <table:table-row>
          <table:table-cell table:style-name="表格3.A2" office:value-type="string">
            <text:p text:style-name="P13"/>
          </table:table-cell>
          <table:table-cell table:style-name="表格3.A2" office:value-type="string">
            <text:p text:style-name="P12">X4Y26（<text:span text:style-name="T12">0</text:span>）</text:p>
          </table:table-cell>
          <table:table-cell table:style-name="表格3.A2" office:value-type="string">
            <text:p text:style-name="P13">X<text:span text:style-name="T11">3Y24（</text:span><text:span text:style-name="T12">2</text:span><text:span text:style-name="T11">）</text:span></text:p>
          </table:table-cell>
          <table:table-cell table:style-name="表格3.D2" office:value-type="string">
            <text:p text:style-name="P13"/>
          </table:table-cell>
        </table:table-row>
        <table:table-row>
          <table:table-cell table:style-name="表格3.A2" office:value-type="string">
            <text:p text:style-name="P13"/>
          </table:table-cell>
          <table:table-cell table:style-name="表格3.A2" office:value-type="string">
            <text:p text:style-name="P12">X4Y25（<text:span text:style-name="T12">1</text:span>）</text:p>
          </table:table-cell>
          <table:table-cell table:style-name="表格3.A2" office:value-type="string">
            <text:p text:style-name="P12">X3Y25（<text:span text:style-name="T12">3</text:span>）</text:p>
          </table:table-cell>
          <table:table-cell table:style-name="表格3.D2" office:value-type="string">
            <text:p text:style-name="P13"/>
          </table:table-cell>
        </table:table-row>
      </table:table>
      <text:p text:style-name="P14"/>
      <text:p text:style-name="P14">这个结果，和ug<text:span text:style-name="T13">898里面的这个图不太能对上：</text:span></text:p>
      <text:p text:style-name="P14"/>
      <text:p text:style-name="P14"><draw:frame draw:style-name="fr5" draw:name="图像7" text:anchor-type="char" svg:width="13.688cm" svg:height="12.711cm" draw:z-index="6"><draw:image xlink:href="Pictures/10000000000002E7000002B21B1EFAC5.png" xlink:type="simple" xlink:show="embed" xlink:actuate="onLoad" draw:mime-type="image/png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总结：</text:p>
      <text:p text:style-name="P16">1. updatemem对于需要固化数据到rom中设计确实有很大的优势。</text:p>
      <text:p text:style-name="P16"/>
      <text:p text:style-name="P16"><draw:frame draw:style-name="fr4" draw:name="图像8" text:anchor-type="char" svg:width="17cm" svg:height="1.281cm" draw:z-index="7"><draw:image xlink:href="Pictures/10000000000003A100000046815AFF9C.png" xlink:type="simple" xlink:show="embed" xlink:actuate="onLoad" draw:mime-type="image/png"/></draw:frame><text:s/></text:p>
      <text:p text:style-name="P17">这个命令执行很快，吃进一个mmi,一个mem和一个bit文件，生成一个新的bit文件，里面的rom和ram就填好了数据。意味着我们的固件、OSD素材、配置等等 ，如果最终需要保存到blockram中，都可以用这个方法。</text:p>
      <text:p text:style-name="P16"/>
      <text:p text:style-name="P18">2. 难点就是这个blockram被vivado自动拆分成几个更小的ramb36或者ramb18后，怎么确定摆放位置。因为每次综合后它们的物理位置会发生变化。按照我现在的方式，我需要添加好ChipScope和Debug的代码，，跑完后去vivado gui中打开impl的设计，Ctrl+F查找所有的blockram，把坐标抄下来，再造一个mem文件，在头、尾和BusBlock分界的地方放上几笔特殊数据，再一次一次的试。</text:p>
      <text:p text:style-name="P18">我能想到的好办法是碰到这些要用updatem<text:span text:style-name="T14">em更新数据的</text:span>ram或者rom，手工拆成几个小的，确保每一个小的ram只用一个ramb36或者ramb18，再给它们取好名字。实现完成后通过脚本report它们的坐标，根据根据前面实验的结果自动生成mmi文件。这一部分有待实验。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9:54:12.421442600</meta:creation-date>
    <dc:date>2026-01-02T12:09:03.813831800</dc:date>
    <meta:editing-duration>PT1H20M30S</meta:editing-duration>
    <meta:editing-cycles>18</meta:editing-cycles>
    <meta:generator>LibreOffice/25.8.4.2$Windows_X86_64 LibreOffice_project/290daaa01b999472f0c7a3890eb6a550fd74c6df</meta:generator>
    <meta:print-date>2026-01-02T12:06:22.739555000</meta:print-date>
    <meta:printed-by>PDF 文件</meta:printed-by>
    <meta:document-statistic meta:table-count="3" meta:image-count="8" meta:object-count="0" meta:page-count="4" meta:paragraph-count="75" meta:word-count="1065" meta:character-count="2455" meta:non-whitespace-character-count="2432"/>
  </office:meta>
</office:document-meta>
</file>